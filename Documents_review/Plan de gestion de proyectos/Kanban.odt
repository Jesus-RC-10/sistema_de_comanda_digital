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900000143E78B3CAF.png" manifest:media-type="image/png"/>
  <manifest:file-entry manifest:full-path="Pictures/10000001000001B00000024915F6150B.png" manifest:media-type="image/png"/>
  <manifest:file-entry manifest:full-path="Pictures/1000000100000239000002510AA00D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1" text:anchor-type="page" text:anchor-page-number="1" svg:x="0.25cm" svg:y="1.371cm" svg:width="21.089cm" svg:height="16.648cm" draw:z-index="0">
        <draw:image xlink:href="Pictures/1000000100000239000002510AA00DF4.png" xlink:type="simple" xlink:show="embed" xlink:actuate="onLoad" draw:mime-type="image/png"/>
      </draw:frame>
      <text:p text:style-name="Standard"/>
      <text:p text:style-name="P1"><draw:frame draw:style-name="fr1" draw:name="Imagen2" text:anchor-type="char" svg:x="-0.991cm" svg:y="-1.272cm" svg:width="19.517cm" svg:height="26.562cm" draw:z-index="1"><draw:image xlink:href="Pictures/10000001000001B00000024915F6150B.png" xlink:type="simple" xlink:show="embed" xlink:actuate="onLoad" draw:mime-type="image/png"/></draw:frame></text:p>
      <text:p text:style-name="Standard"><draw:frame draw:style-name="fr2" draw:name="Imagen3" text:anchor-type="char" svg:width="7.052cm" svg:height="15.023cm" draw:z-index="2"><draw:image xlink:href="Pictures/100000010000009900000143E78B3CAF.png" xlink:type="simple" xlink:show="embed" xlink:actuate="onLoad" draw:mime-type="image/pn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7:45:31.656396240</meta:creation-date>
    <dc:date>2026-05-24T17:52:38.010644256</dc:date>
    <meta:editing-duration>PT7M7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25.8.7.3$Linux_X86_64 LibreOffice_project/580$Build-3</meta:generator>
  </office:meta>
</office:document-meta>
</file>